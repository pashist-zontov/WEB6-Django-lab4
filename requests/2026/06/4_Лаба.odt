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color="#000000" loext:opacity="100%"/>
    </style:style>
    <style:style style:name="P2" style:family="paragraph" style:parent-style-name="Standard">
      <style:paragraph-properties fo:margin-top="0cm" fo:margin-bottom="0.282cm" style:contextual-spacing="false" fo:line-height="115%" fo:text-align="justify" style:justify-single-word="false" fo:text-indent="1.251cm" style:auto-text-indent="false"/>
      <style:text-properties style:font-name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: Middleware и расширенная логика Django</text:h>
      <text:p text:style-name="P2">Разработайте Django-приложение «Корпоративный портал заявок», в котором пользователи создают заявки на внутренние сервисы, прикладывают файлы, меняют статус заявок и оставляют комментарии. В системе должны быть роли: обычный пользователь, модератор и администратор. Реализуйте модели заявок, комментариев, истории изменений, пользовательских настроек и audit log. В интерфейсе должны быть страницы списка заявок с фильтрами, карточка заявки, создание и редактирование заявки, панель модератора, а также REST API для основных сущностей. Доступ к действиям должен зависеть от роли, владельца объекта, статуса заявки и времени последнего изменения.</text:p>
      <text:p text:style-name="P2">Основная часть задания, реализовать несколько middleware: сбор request id и проброс его в логи и ответы; аудит действий пользователя с записью IP, user agent, метода, пути и результата; ограничение частоты запросов для отдельных endpoint; автоматическое определение пользователя; запрет опасных операций вне рабочего времени для не-администратор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/>
      <style:text-properties fo:color="#17365d" loext:opacity="100%" style:font-name="Calibri" fo:font-family="Calibri" style:font-family-generic="roman" style:font-pitch="variable" fo:font-size="16pt" fo:letter-spacing="0.009cm" fo:font-weight="bold" style:letter-kerning="true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lef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4</meta:editing-cycles>
    <meta:creation-date>2013-12-23T23:15:00</meta:creation-date>
    <dc:date>2026-06-09T10:05:07.401072100</dc:date>
    <meta:editing-duration>PT3M16S</meta:editing-duration>
    <meta:generator>LibreOffice/26.2.3.2$Linux_X86_64 LibreOffice_project/d4d5ed47b6084125f28d269a5650105d54dde034</meta:generator>
    <meta:document-statistic meta:table-count="0" meta:image-count="0" meta:object-count="0" meta:page-count="1" meta:paragraph-count="3" meta:word-count="133" meta:character-count="1052" meta:non-whitespace-character-count="922"/>
    <meta:user-defined meta:name="AppVersion">14.0000</meta:user-defined>
    <meta:template xlink:type="simple" xlink:actuate="onRequest" xlink:title="Normal.dotm" xlink:href=""/>
  </office:meta>
</office:document-meta>
</file>